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 fo:text-align="justify"/>
      <style:text-properties style:font-name="Times New Roman" fo:font-weight="bold" style:font-weight-asian="bold" fo:font-size="30pt" style:font-size-asian="30pt" style:font-size-complex="30pt"/>
    </style:style>
    <style:style style:name="P2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3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4" style:parent-style-name="Normá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5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6" style:parent-style-name="Normá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7" style:parent-style-name="Normál" style:family="paragraph">
      <style:paragraph-properties fo:text-align="justify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" style:parent-style-name="Normál" style:family="paragraph">
      <style:paragraph-properties fo:text-align="justify" fo:line-height="150%"/>
    </style:style>
    <style:style style:name="T11" style:parent-style-name="Bekezdésalapbetűtípusa" style:family="text">
      <style:text-properties style:font-name="Times New Roman" fo:font-size="12pt" style:font-size-asian="12pt" style:font-size-complex="12pt"/>
    </style:style>
    <style:style style:name="T12" style:parent-style-name="Bekezdésalapbetűtípusa" style:family="text">
      <style:text-properties style:font-name="Times New Roman" fo:font-size="12pt" style:font-size-asian="12pt" style:font-size-complex="12pt"/>
    </style:style>
    <style:style style:name="P13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4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" style:parent-style-name="Normál" style:family="paragraph">
      <style:paragraph-properties fo:text-align="justify"/>
    </style:style>
    <style:style style:name="T17" style:parent-style-name="Bekezdésalapbetűtípusa" style:family="text">
      <style:text-properties style:font-name="Times New Roman" fo:font-size="16pt" style:font-size-asian="16pt" style:font-size-complex="16pt"/>
    </style:style>
    <style:style style:name="T18" style:parent-style-name="Bekezdésalapbetűtípusa" style:family="text">
      <style:text-properties style:font-name="Times New Roman" fo:font-size="16pt" style:font-size-asian="16pt" style:font-size-complex="16pt"/>
    </style:style>
    <style:style style:name="P1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0" style:parent-style-name="Normál" style:family="paragraph">
      <style:paragraph-properties fo:text-align="justify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" style:parent-style-name="Normál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22" style:parent-style-name="Normál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23" style:parent-style-name="Normál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24" style:parent-style-name="Normál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25" style:parent-style-name="Normál" style:family="paragraph">
      <style:paragraph-properties fo:text-align="justify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6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0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1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2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3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4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5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6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0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1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2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3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4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5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6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0" style:parent-style-name="Normál" style:family="paragraph">
      <style:paragraph-properties fo:text-align="justify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2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3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4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5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6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59" style:parent-style-name="Normál" style:family="paragraph">
      <style:paragraph-properties fo:text-align="justify" fo:line-height="150%"/>
    </style:style>
    <style:style style:name="P60" style:parent-style-name="Normál" style:family="paragraph">
      <style:paragraph-properties fo:text-align="justify" fo:line-height="150%"/>
    </style:style>
    <style:style style:name="P61" style:parent-style-name="Normál" style:family="paragraph">
      <style:paragraph-properties fo:text-align="justify" fo:line-height="150%"/>
    </style:style>
    <style:style style:name="P62" style:parent-style-name="Normál" style:family="paragraph">
      <style:paragraph-properties fo:text-align="justify" fo:line-height="150%"/>
    </style:style>
    <style:style style:name="P63" style:parent-style-name="Normál" style:family="paragraph">
      <style:paragraph-properties fo:text-align="justify" fo:line-height="150%"/>
    </style:style>
    <style:style style:name="P64" style:parent-style-name="Normál" style:family="paragraph">
      <style:paragraph-properties fo:text-align="justify" fo:line-height="150%"/>
    </style:style>
    <style:style style:name="P65" style:parent-style-name="Normál" style:family="paragraph">
      <style:paragraph-properties fo:text-align="justify" fo:line-height="150%"/>
    </style:style>
    <style:style style:name="P66" style:parent-style-name="Normál" style:family="paragraph">
      <style:paragraph-properties fo:text-align="justify" fo:line-height="150%"/>
    </style:style>
    <style:style style:name="P67" style:parent-style-name="Normál" style:family="paragraph">
      <style:paragraph-properties fo:text-align="justify" fo:line-height="150%"/>
    </style:style>
    <style:style style:name="P68" style:parent-style-name="Normál" style:family="paragraph">
      <style:paragraph-properties fo:text-align="justify" fo:line-height="150%"/>
    </style:style>
    <style:style style:name="P69" style:parent-style-name="Normál" style:family="paragraph">
      <style:paragraph-properties fo:text-align="justify" fo:line-height="150%"/>
    </style:style>
    <style:style style:name="P70" style:parent-style-name="Normál" style:family="paragraph">
      <style:paragraph-properties fo:break-before="page"/>
      <style:text-properties fo:hyphenate="true"/>
    </style:style>
    <style:style style:name="P71" style:parent-style-name="Normál" style:family="paragraph">
      <style:paragraph-properties fo:text-align="justify" fo:line-height="150%"/>
    </style:style>
    <style:style style:name="T72" style:parent-style-name="Bekezdésalapbetűtípusa" style:family="text">
      <style:text-properties fo:font-weight="bold" style:font-weight-asian="bold" style:font-weight-complex="bold"/>
    </style:style>
    <style:style style:name="T73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4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5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6" style:parent-style-name="Normál" style:family="paragraph">
      <style:paragraph-properties fo:text-align="justify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78" style:parent-style-name="Normál" style:family="paragraph">
      <style:paragraph-properties fo:text-align="justify" fo:line-height="150%"/>
    </style:style>
    <style:style style:name="T79" style:parent-style-name="Bekezdésalapbetűtípusa" style:family="text">
      <style:text-properties style:font-name="Times New Roman" fo:font-size="12pt" style:font-size-asian="12pt" style:font-size-complex="12pt"/>
    </style:style>
    <style:style style:name="T80" style:parent-style-name="Bekezdésalapbetűtípusa" style:family="text">
      <style:text-properties style:font-name="Times New Roman" fo:font-size="12pt" style:font-size-asian="12pt" style:font-size-complex="12pt"/>
    </style:style>
    <style:style style:name="P81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82" style:parent-style-name="Normál" style:family="paragraph">
      <style:paragraph-properties fo:text-align="justify" fo:line-height="150%"/>
    </style:style>
    <style:style style:name="T83" style:parent-style-name="Bekezdésalapbetűtípusa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Fejlesztői Dokumentáció Backend</text:p>
      <text:p text:style-name="P2"/>
      <text:p text:style-name="P3"/>
      <text:p text:style-name="P4">A projekt célja:</text:p>
      <text:p text:style-name="P5"><text:tab/>Ez a weboldal egy ékszereket árusító webshop. A felhasználónak lehetősége van regisztrálni és bejelentkezni. A bejelentkezés után pedig lehetősége van a kosár funkciókat alkalmazni.</text:p>
      <text:p text:style-name="P6"/>
      <text:p text:style-name="P7">Környezet és fejlesztői eszközök:</text:p>
      <text:p text:style-name="P8"><text:tab/>Visual Studio Code (verzió: 1.98.2)</text:p>
      <text:p text:style-name="P9"><text:tab/>Node.js (verzió: 20.18.2)</text:p>
      <text:p text:style-name="P10"><text:span text:style-name="T11"><text:tab/>Bootstrap (</text:span>v5.3.8<text:span text:style-name="T12">)</text:span></text:p>
      <text:p text:style-name="P13">Függőségek:</text:p>
      <text:p text:style-name="P14">(express server)</text:p>
      <text:p text:style-name="P15">Port: 3000</text:p>
      <text:p text:style-name="P16"><text:span text:style-name="T17"><text:tab/></text:span><text:span text:style-name="T18"><draw:frame draw:style-name="a0" draw:name="Kép 1" text:anchor-type="as-char" svg:x="0in" svg:y="0in" svg:width="2.75943in" svg:height="1.13952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>Hogyan indítsd el a projektet:</text:p>
      <text:p text:style-name="P21">1. Telepítsd a Node.js v20.18.2-es verzióját a számítógépedre (ha még nincs fent).</text:p>
      <text:p text:style-name="P22">2. Nyiss egy terminált a projekt fő mappájában.</text:p>
      <text:p text:style-name="P23">3. Futtasd a 'node app.js' parancsot a szerver elindításához.</text:p>
      <text:p text:style-name="P24"/>
      <text:p text:style-name="P25">Az app.js<text:s/>express metódusai:</text:p>
      <text:p text:style-name="P26">POST /register</text:p>
      <text:soft-page-break/>
      <text:p text:style-name="P27"><text:tab/>várt adatok Json formátumban: {keresztnév, vezetéknév, emailcím,<text:s/>telefonszám, jelszó, jelszóismét}</text:p>
      <text:p text:style-name="P28"><text:tab/>válasz adat struktúra Json formátum: {szerver üzenete, hibák listája}</text:p>
      <text:p text:style-name="P29"><text:tab/>HTTP státuszok:</text:p>
      <text:p text:style-name="P30"><text:tab/><text:tab/>201: sikeres regisztráció</text:p>
      <text:p text:style-name="P31"><text:tab/><text:tab/>400: A felhasználó elrontott valamit</text:p>
      <text:p text:style-name="P32"><text:tab/><text:tab/>500: A szerverrel történt valami</text:p>
      <text:p text:style-name="P33">Regisztrációs logika: A /register metódus egy külső függvénnyel (app.js /validateRegistrationData())<text:s/>megnézi, hogy a felhasználó helyes adatokat adott meg és visszaad egy tömböt a hibákkal. Ha a tömb üres akkor lefut a regisztráció.</text:p>
      <text:p text:style-name="P34"/>
      <text:p text:style-name="P35">POST /login</text:p>
      <text:p text:style-name="P36"><text:tab/>várt adatok Json formátumban:<text:s/>{emailcím, jelszó}</text:p>
      <text:p text:style-name="P37"><text:tab/>válasz adat struktúra Json formátum: {szerver üzenete, hibák listája}</text:p>
      <text:p text:style-name="P38"><text:tab/>HTTP státuszok:</text:p>
      <text:p text:style-name="P39"><text:tab/><text:tab/>200: sikeres<text:s/>bejelentkezés</text:p>
      <text:p text:style-name="P40"><text:tab/><text:tab/>400:<text:s/>a<text:s/>felhasználó elrontott valamit</text:p>
      <text:p text:style-name="P41"><text:tab/><text:tab/>500:<text:s/>a<text:s/>szerverrel történt valami</text:p>
      <text:p text:style-name="P42">Logika: Itt is a külső függvény (validateLoginData)<text:s/>megnézi az adatok helyességét és visszaadja a hibákat. Ha a hibák tömbje üres akkor lefut a bejelentkezés.</text:p>
      <text:p text:style-name="P43"/>
      <text:p text:style-name="P44">GET /me:</text:p>
      <text:p text:style-name="P45"><text:tab/>Lekérdezi,<text:s/>hogy be van e valaki jelentkezve, ezt a metódust a bejelentkezes.js fájlban a<text:s/>fetchUserInfo()<text:s/>függvényben kérjük le.<text:s/></text:p>
      <text:p text:style-name="P46"/>
      <text:p text:style-name="P47">GET /logout</text:p>
      <text:soft-page-break/>
      <text:p text:style-name="P48"><text:tab/>Összeomlasztja a sessiont.</text:p>
      <text:p text:style-name="P49"/>
      <text:p text:style-name="P50">Frontend JavaScript fájlok:</text:p>
      <text:p text:style-name="P51">bejelentkezes.js:</text:p>
      <text:p text:style-name="P52">Lekéri a /me metódust és html templatek segítségével beállítja a navbar állapotát. bejelentkezve/kijelentkezve.</text:p>
      <text:p text:style-name="P53"/>
      <text:p text:style-name="P54">regisztracio.js:</text:p>
      <text:p text:style-name="P55">Ez a fájl fetcheli a /register metódust és megmondja a felhasználónak,<text:s/>hogy mik a hibái,<text:s/>ha vannak.</text:p>
      <text:p text:style-name="P56"/>
      <text:p text:style-name="P57">loginDataFetch.js:</text:p>
      <text:p text:style-name="P58">Ez a fájl hasonló a regisztracio.js fájlra, viszont a használat helye a bejelentkezés oldalon van.<text:s/></text:p>
      <text:p text:style-name="P59"/>
      <text:p text:style-name="P60"/>
      <text:p text:style-name="P61">fulbevalok.js,<text:s/>gyuruk.js,<text:s/>karkotok.js,<text:s/>karkotok.js</text:p>
      <text:p text:style-name="P62">Ezek a fájlok segítenek a weboldalon betölteni a kosar.json fájlból az adatokat. Ezekből az adatokból aztán a forEach ciklus kártyákat készít, ezzel dinamikussá és bővíthetővé alakítja a termékek felsorolását.</text:p>
      <text:p text:style-name="P63"/>
      <text:p text:style-name="P64">szuro.js:<text:s/></text:p>
      <text:p text:style-name="P65">Ez a<text:s/>fájl működtati a szűrőt a weboldalon. querySelectorokkal dolgozik.</text:p>
      <text:p text:style-name="P66"/>
      <text:p text:style-name="P67"/>
      <text:p text:style-name="P68"/>
      <text:p text:style-name="P69"/>
      <text:p text:style-name="P70"/>
      <text:p text:style-name="P71"><text:span text:style-name="T72"><draw:frame draw:z-index="251658240" draw:style-name="a1" draw:name="Kép 3" text:anchor-type="paragraph" svg:x="0.62014in" svg:y="0.22569in" svg:width="2.92639in" svg:height="9.1875in" style:rel-width="scale" style:rel-height="scale"><draw:image xlink:href="media/image2.png" xlink:type="simple" xlink:show="embed" xlink:actuate="onLoad"/><svg:title/><svg:desc/></draw:frame></text:span><text:span text:style-name="T73">Mappastruktú</text:span><text:span text:style-name="T74">r</text:span><text:span text:style-name="T75">a:</text:span></text:p>
      <text:soft-page-break/>
      <text:p text:style-name="P76">Json struktúra:</text:p>
      <text:p text:style-name="P77">Regisztrált felhasználó:</text:p>
      <text:p text:style-name="P78"><text:span text:style-name="T79"><draw:frame draw:style-name="a2" draw:name="Kép 1" text:anchor-type="as-char" svg:x="0in" svg:y="0in" svg:width="2.70871in" svg:height="1.37519in" style:rel-width="scale" style:rel-height="scale"><draw:image xlink:href="media/image3.png" xlink:type="simple" xlink:show="embed" xlink:actuate="onLoad"/><svg:title/><svg:desc/></draw:frame></text:span><text:span text:style-name="T80"><text:tab/></text:span></text:p>
      <text:p text:style-name="P81">Kosár Json struktúra:</text:p>
      <text:p text:style-name="P82"><text:span text:style-name="T83"><draw:frame draw:style-name="a3" draw:name="Kép 1" text:anchor-type="as-char" svg:x="0in" svg:y="0in" svg:width="2.82331in" svg:height="2.20864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rbán Dávid Péter</meta:initial-creator>
    <dc:creator>Urbán Dávid Péter</dc:creator>
    <meta:creation-date>2026-05-28T10:04:00Z</meta:creation-date>
    <dc:date>2026-06-09T18:15:00Z</dc:date>
    <meta:template xlink:href="Normal.dotm" xlink:type="simple"/>
    <meta:editing-cycles>53</meta:editing-cycles>
    <meta:editing-duration>PT5940S</meta:editing-duration>
    <meta:document-statistic meta:page-count="5" meta:paragraph-count="5" meta:word-count="331" meta:character-count="2612" meta:row-count="19" meta:non-whitespace-character-count="2286"/>
  </office:meta>
</office:document-meta>
</file>